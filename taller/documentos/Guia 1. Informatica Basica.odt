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3.474cm" table:align="left"/>
    </style:style>
    <style:style style:name="Tabla1.A" style:family="table-column">
      <style:table-column-properties style:column-width="3.939cm"/>
    </style:style>
    <style:style style:name="Tabla1.B" style:family="table-column">
      <style:table-column-properties style:column-width="9.53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6.142cm" table:align="left"/>
    </style:style>
    <style:style style:name="Tabla2.A" style:family="table-column">
      <style:table-column-properties style:column-width="3.501cm"/>
    </style:style>
    <style:style style:name="Tabla2.B" style:family="table-column">
      <style:table-column-properties style:column-width="2.641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5.865cm" table:align="left"/>
    </style:style>
    <style:style style:name="Tabla3.A" style:family="table-column">
      <style:table-column-properties style:column-width="3.657cm"/>
    </style:style>
    <style:style style:name="Tabla3.B" style:family="table-column">
      <style:table-column-properties style:column-width="2.208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uía Didáctica – Unidad 1: Introducción a la Informática</text:h>
      <text:h text:style-name="Heading_20_2" text:outline-level="2">Programa</text:h>
      <text:p text:style-name="Text_20_body"><text:span text:style-name="Strong_20_Emphasis">Taller de Informática Básica y Software Libre</text:span></text:p>
      <text:h text:style-name="Heading_20_3" text:outline-level="3">Unidad 1: Introducción a la Informática</text:h>
      <text:p text:style-name="Text_20_body"><text:span text:style-name="Strong_20_Emphasis">Duración:</text:span> 8 horas<text:line-break/><text:span text:style-name="Strong_20_Emphasis">Evaluación:</text:span> 10%<text:line-break/><text:span text:style-name="Strong_20_Emphasis">Software Libre de apoyo:</text:span> Linux (Sistema Operativo)</text:p>
      <text:p text:style-name="Horizontal_20_Line"/>
      <text:h text:style-name="Heading_20_1" text:outline-level="1">1. Información General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Aspecto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Área</text:p>
          </table:table-cell>
          <table:table-cell table:style-name="Tabla1.A1" office:value-type="string">
            <text:p text:style-name="Table_20_Contents">Informática Básica</text:p>
          </table:table-cell>
        </table:table-row>
        <table:table-row>
          <table:table-cell table:style-name="Tabla1.A1" office:value-type="string">
            <text:p text:style-name="Table_20_Contents">Unidad</text:p>
          </table:table-cell>
          <table:table-cell table:style-name="Tabla1.A1" office:value-type="string">
            <text:p text:style-name="Table_20_Contents">Introducción a la Informática</text:p>
          </table:table-cell>
        </table:table-row>
        <table:table-row>
          <table:table-cell table:style-name="Tabla1.A1" office:value-type="string">
            <text:p text:style-name="Table_20_Contents">Modalidad</text:p>
          </table:table-cell>
          <table:table-cell table:style-name="Tabla1.A1" office:value-type="string">
            <text:p text:style-name="Table_20_Contents">Teórico - Práctica</text:p>
          </table:table-cell>
        </table:table-row>
        <table:table-row>
          <table:table-cell table:style-name="Tabla1.A1" office:value-type="string">
            <text:p text:style-name="Table_20_Contents">Duración</text:p>
          </table:table-cell>
          <table:table-cell table:style-name="Tabla1.A1" office:value-type="string">
            <text:p text:style-name="Table_20_Contents">8 horas</text:p>
          </table:table-cell>
        </table:table-row>
        <table:table-row>
          <table:table-cell table:style-name="Tabla1.A1" office:value-type="string">
            <text:p text:style-name="Table_20_Contents">Herramienta principal</text:p>
          </table:table-cell>
          <table:table-cell table:style-name="Tabla1.A1" office:value-type="string">
            <text:p text:style-name="Table_20_Contents">Linux</text:p>
          </table:table-cell>
        </table:table-row>
        <table:table-row>
          <table:table-cell table:style-name="Tabla1.A1" office:value-type="string">
            <text:p text:style-name="Table_20_Contents">Producto final</text:p>
          </table:table-cell>
          <table:table-cell table:style-name="Tabla1.A1" office:value-type="string">
            <text:p text:style-name="Table_20_Contents">Reconocimiento físico y lógico del equipo de cómputo</text:p>
          </table:table-cell>
        </table:table-row>
      </table:table>
      <text:p text:style-name="Horizontal_20_Line"/>
      <text:h text:style-name="Heading_20_1" text:outline-level="1">2. Competencia</text:h>
      <text:p text:style-name="Text_20_body">Reconocer los componentes físicos y lógicos de un sistema informático, identificando su funcionamiento básico mediante el uso de un sistema operativo libre.</text:p>
      <text:p text:style-name="Horizontal_20_Line"/>
      <text:h text:style-name="Heading_20_1" text:outline-level="1">3. Resultado de Aprendizaje</text:h>
      <text:p text:style-name="Text_20_body">Al finalizar la unidad, el estudiante será capaz de:</text:p>
      <text:list text:style-name="L1">
        <text:list-item>
          <text:p text:style-name="P1">Identificar los componentes principales del hardware.</text:p>
        </text:list-item>
        <text:list-item>
          <text:p text:style-name="P1">Diferenciar hardware y software.</text:p>
        </text:list-item>
        <text:list-item>
          <text:p text:style-name="P1">Reconocer los tipos de software.</text:p>
        </text:list-item>
        <text:list-item>
          <text:p text:style-name="P1">Comprender el concepto de software libre.</text:p>
        </text:list-item>
        <text:list-item>
          <text:p text:style-name="P1"><text:soft-page-break/>Utilizar las funciones básicas del sistema operativo Linux.</text:p>
        </text:list-item>
        <text:list-item>
          <text:p text:style-name="P1">Manipular ventanas y elementos del escritorio.</text:p>
        </text:list-item>
      </text:list>
      <text:p text:style-name="Horizontal_20_Line"/>
      <text:h text:style-name="Heading_20_1" text:outline-level="1">4. Saberes Previos</text:h>
      <text:p text:style-name="Text_20_body">Antes de iniciar la unidad, el estudiante deberá responder:</text:p>
      <text:list text:style-name="L2">
        <text:list-item>
          <text:p text:style-name="P2">¿Qué es un computador?</text:p>
        </text:list-item>
        <text:list-item>
          <text:p text:style-name="P2">¿Para qué sirve un sistema operativo?</text:p>
        </text:list-item>
        <text:list-item>
          <text:p text:style-name="P2">¿Qué programas conoce?</text:p>
        </text:list-item>
        <text:list-item>
          <text:p text:style-name="P2">¿Ha utilizado Linux alguna vez?</text:p>
        </text:list-item>
      </text:list>
      <text:p text:style-name="Horizontal_20_Line"/>
      <text:h text:style-name="Heading_20_1" text:outline-level="1">5. Contenidos de Formación</text:h>
      <text:h text:style-name="Heading_20_2" text:outline-level="2">Parte Teórica (¿Qué aprenderemos?)</text:h>
      <text:h text:style-name="Heading_20_3" text:outline-level="3">Tema 1. Hardware y sus Componentes</text:h>
      <text:p text:style-name="Text_20_body"><text:span text:style-name="Strong_20_Emphasis">Conceptos principales</text:span></text:p>
      <text:list text:style-name="L3">
        <text:list-item>
          <text:p text:style-name="P3">Definición de hardware.</text:p>
        </text:list-item>
        <text:list-item>
          <text:p text:style-name="P3">Dispositivos de entrada.</text:p>
        </text:list-item>
        <text:list-item>
          <text:p text:style-name="P3">Dispositivos de salida.</text:p>
        </text:list-item>
        <text:list-item>
          <text:p text:style-name="P3">Dispositivos de almacenamiento.</text:p>
        </text:list-item>
        <text:list-item>
          <text:p text:style-name="P3">Unidad central de procesamiento (CPU).</text:p>
        </text:list-item>
        <text:list-item>
          <text:p text:style-name="P3">Memoria RAM.</text:p>
        </text:list-item>
      </text:list>
      <text:p text:style-name="Text_20_body"><text:span text:style-name="Strong_20_Emphasis">Actividad</text:span></text:p>
      <text:p text:style-name="Text_20_body">Identificar los componentes de un computador mediante imágenes o equipos reales.</text:p>
      <text:p text:style-name="Horizontal_20_Line"/>
      <text:h text:style-name="Heading_20_3" text:outline-level="3">Tema 2. Software y Tipos de Programas</text:h>
      <text:p text:style-name="Text_20_body"><text:span text:style-name="Strong_20_Emphasis">Conceptos principales</text:span></text:p>
      <text:list text:style-name="L4">
        <text:list-item>
          <text:p text:style-name="P4">Qué es el software.</text:p>
        </text:list-item>
        <text:list-item>
          <text:p text:style-name="P4">Software de sistema.</text:p>
        </text:list-item>
        <text:list-item>
          <text:p text:style-name="P4"><text:soft-page-break/>Software de aplicación.</text:p>
        </text:list-item>
        <text:list-item>
          <text:p text:style-name="P4">Software de programación.</text:p>
        </text:list-item>
      </text:list>
      <text:p text:style-name="Text_20_body"><text:span text:style-name="Strong_20_Emphasis">Actividad</text:span></text:p>
      <text:p text:style-name="Text_20_body">Clasificar diferentes programas según su tipo.</text:p>
      <text:p text:style-name="Text_20_body">Ejemplo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Programa</text:p>
            </table:table-cell>
            <table:table-cell table:style-name="Tabla2.A1" office:value-type="string">
              <text:p text:style-name="Table_20_Heading">Tipo</text:p>
            </table:table-cell>
          </table:table-row>
        </table:table-header-rows>
        <table:table-row>
          <table:table-cell table:style-name="Tabla2.A1" office:value-type="string">
            <text:p text:style-name="Table_20_Contents">LibreOffice</text:p>
          </table:table-cell>
          <table:table-cell table:style-name="Tabla2.A1" office:value-type="string">
            <text:p text:style-name="Table_20_Contents">Aplicación</text:p>
          </table:table-cell>
        </table:table-row>
        <table:table-row>
          <table:table-cell table:style-name="Tabla2.A1" office:value-type="string">
            <text:p text:style-name="Table_20_Contents">Linux</text:p>
          </table:table-cell>
          <table:table-cell table:style-name="Tabla2.A1" office:value-type="string">
            <text:p text:style-name="Table_20_Contents">Sistema</text:p>
          </table:table-cell>
        </table:table-row>
        <table:table-row>
          <table:table-cell table:style-name="Tabla2.A1" office:value-type="string">
            <text:p text:style-name="Table_20_Contents">Visual Studio Code</text:p>
          </table:table-cell>
          <table:table-cell table:style-name="Tabla2.A1" office:value-type="string">
            <text:p text:style-name="Table_20_Contents">Programación</text:p>
          </table:table-cell>
        </table:table-row>
      </table:table>
      <text:p text:style-name="Horizontal_20_Line"/>
      <text:h text:style-name="Heading_20_3" text:outline-level="3">Tema 3. Sistema Operativo Libre</text:h>
      <text:p text:style-name="Text_20_body"><text:span text:style-name="Strong_20_Emphasis">Conceptos principales</text:span></text:p>
      <text:list text:style-name="L5">
        <text:list-item>
          <text:p text:style-name="P5">Qué es un sistema operativo.</text:p>
        </text:list-item>
        <text:list-item>
          <text:p text:style-name="P5">Funciones principales.</text:p>
        </text:list-item>
        <text:list-item>
          <text:p text:style-name="P5">Concepto de software libre.</text:p>
        </text:list-item>
        <text:list-item>
          <text:p text:style-name="P5">Ventajas del software libre.</text:p>
        </text:list-item>
        <text:list-item>
          <text:p text:style-name="P5">Distribuciones Linux.</text:p>
        </text:list-item>
      </text:list>
      <text:p text:style-name="Text_20_body"><text:span text:style-name="Strong_20_Emphasis">Actividad</text:span></text:p>
      <text:p text:style-name="Text_20_body">Observación guiada de una distribución Linux.</text:p>
      <text:p text:style-name="Horizontal_20_Line"/>
      <text:h text:style-name="Heading_20_3" text:outline-level="3">Tema 4. El Escritorio y las Ventanas</text:h>
      <text:p text:style-name="Text_20_body"><text:span text:style-name="Strong_20_Emphasis">Conceptos principales</text:span></text:p>
      <text:list text:style-name="L6">
        <text:list-item>
          <text:p text:style-name="P6">Escritorio.</text:p>
        </text:list-item>
        <text:list-item>
          <text:p text:style-name="P6">Barra de tareas.</text:p>
        </text:list-item>
        <text:list-item>
          <text:p text:style-name="P6">Menú de aplicaciones.</text:p>
        </text:list-item>
        <text:list-item>
          <text:p text:style-name="P6">Iconos.</text:p>
        </text:list-item>
        <text:list-item>
          <text:p text:style-name="P6">Carpetas.</text:p>
        </text:list-item>
        <text:list-item>
          <text:p text:style-name="P6">Ventanas.</text:p>
        </text:list-item>
      </text:list>
      <text:p text:style-name="Text_20_body"><text:span text:style-name="Strong_20_Emphasis">Actividad</text:span></text:p>
      <text:p text:style-name="Text_20_body">Exploración libre del entorno Linux.</text:p>
      <text:p text:style-name="Horizontal_20_Line"/>
      <text:h text:style-name="Heading_20_1" text:outline-level="1"><text:soft-page-break/>6. Parte Práctica (¿Qué Haremos?)</text:h>
      <text:h text:style-name="Heading_20_2" text:outline-level="2">Práctica 1: Encender y Apagar el Equipo</text:h>
      <text:h text:style-name="Heading_20_3" text:outline-level="3">Procedimiento</text:h>
      <text:list text:style-name="L7">
        <text:list-item>
          <text:p text:style-name="P7">Encender correctamente el computador.</text:p>
        </text:list-item>
        <text:list-item>
          <text:p text:style-name="P7">Esperar la carga del sistema operativo.</text:p>
        </text:list-item>
        <text:list-item>
          <text:p text:style-name="P7">Identificar la pantalla de inicio.</text:p>
        </text:list-item>
        <text:list-item>
          <text:p text:style-name="P7">Apagar el equipo mediante el menú correspondiente.</text:p>
        </text:list-item>
      </text:list>
      <text:h text:style-name="Heading_20_3" text:outline-level="3">Evidencia</text:h>
      <text:p text:style-name="Text_20_body">Fotografía o demostración práctica.</text:p>
      <text:p text:style-name="Horizontal_20_Line"/>
      <text:h text:style-name="Heading_20_2" text:outline-level="2">Práctica 2: Reconocimiento de Componentes Físicos</text:h>
      <text:h text:style-name="Heading_20_3" text:outline-level="3">Procedimiento</text:h>
      <text:p text:style-name="Text_20_body">Identificar:</text:p>
      <text:list text:style-name="L8">
        <text:list-item>
          <text:p text:style-name="P8">Monitor</text:p>
        </text:list-item>
        <text:list-item>
          <text:p text:style-name="P8">Teclado</text:p>
        </text:list-item>
        <text:list-item>
          <text:p text:style-name="P8">Mouse</text:p>
        </text:list-item>
        <text:list-item>
          <text:p text:style-name="P8">CPU</text:p>
        </text:list-item>
        <text:list-item>
          <text:p text:style-name="P8">Parlantes</text:p>
        </text:list-item>
        <text:list-item>
          <text:p text:style-name="P8">Memoria USB</text:p>
        </text:list-item>
      </text:list>
      <text:h text:style-name="Heading_20_3" text:outline-level="3">Evidencia</text:h>
      <text:p text:style-name="Text_20_body">Lista de chequeo diligenciada.</text:p>
      <text:p text:style-name="Horizontal_20_Line"/>
      <text:h text:style-name="Heading_20_2" text:outline-level="2">Práctica 3: Exploración del Escritorio Linux</text:h>
      <text:h text:style-name="Heading_20_3" text:outline-level="3">Procedimiento</text:h>
      <text:list text:style-name="L9">
        <text:list-item>
          <text:p text:style-name="P9">Iniciar sesión.</text:p>
        </text:list-item>
        <text:list-item>
          <text:p text:style-name="P9">Abrir el menú principal.</text:p>
        </text:list-item>
        <text:list-item>
          <text:p text:style-name="P9"><text:soft-page-break/>Identificar aplicaciones.</text:p>
        </text:list-item>
        <text:list-item>
          <text:p text:style-name="P9">Cambiar el fondo de pantalla.</text:p>
        </text:list-item>
        <text:list-item>
          <text:p text:style-name="P9">Crear una carpeta.</text:p>
        </text:list-item>
      </text:list>
      <text:h text:style-name="Heading_20_3" text:outline-level="3">Evidencia</text:h>
      <text:p text:style-name="Text_20_body">Captura de pantalla del escritorio personalizado.</text:p>
      <text:p text:style-name="Horizontal_20_Line"/>
      <text:h text:style-name="Heading_20_2" text:outline-level="2">Práctica 4: Manejo de Ventanas</text:h>
      <text:h text:style-name="Heading_20_3" text:outline-level="3">Procedimiento</text:h>
      <text:p text:style-name="Text_20_body">Realizar las siguientes acciones:</text:p>
      <text:list text:style-name="L10">
        <text:list-item>
          <text:p text:style-name="P10">Abrir una aplicación.</text:p>
        </text:list-item>
        <text:list-item>
          <text:p text:style-name="P10">Minimizar una ventana.</text:p>
        </text:list-item>
        <text:list-item>
          <text:p text:style-name="P10">Maximizar una ventana.</text:p>
        </text:list-item>
        <text:list-item>
          <text:p text:style-name="P10">Restaurar tamaño.</text:p>
        </text:list-item>
        <text:list-item>
          <text:p text:style-name="P10">Mover una ventana.</text:p>
        </text:list-item>
        <text:list-item>
          <text:p text:style-name="P10">Cerrar una ventana.</text:p>
        </text:list-item>
      </text:list>
      <text:h text:style-name="Heading_20_3" text:outline-level="3">Evidencia</text:h>
      <text:p text:style-name="Text_20_body">Observación directa del instructor.</text:p>
      <text:p text:style-name="Horizontal_20_Line"/>
      <text:h text:style-name="Heading_20_1" text:outline-level="1">7. Metodología</text:h>
      <text:p text:style-name="Text_20_body">La unidad se desarrollará mediante:</text:p>
      <text:list text:style-name="L11">
        <text:list-item>
          <text:p text:style-name="P11">Explicaciones guiadas.</text:p>
        </text:list-item>
        <text:list-item>
          <text:p text:style-name="P11">Demostraciones prácticas.</text:p>
        </text:list-item>
        <text:list-item>
          <text:p text:style-name="P11">Aprendizaje basado en la exploración.</text:p>
        </text:list-item>
        <text:list-item>
          <text:p text:style-name="P11">Trabajo colaborativo.</text:p>
        </text:list-item>
        <text:list-item>
          <text:p text:style-name="P11">Resolución de retos sencillos.</text:p>
        </text:list-item>
      </text:list>
      <text:p text:style-name="Horizontal_20_Line"/>
      <text:h text:style-name="Heading_20_1" text:outline-level="1"><text:soft-page-break/>8. Recursos</text:h>
      <text:h text:style-name="Heading_20_3" text:outline-level="3">Recursos Tecnológicos</text:h>
      <text:list text:style-name="L12">
        <text:list-item>
          <text:p text:style-name="P12">Computadores.</text:p>
        </text:list-item>
        <text:list-item>
          <text:p text:style-name="P12">Sistema operativo Linux.</text:p>
        </text:list-item>
        <text:list-item>
          <text:p text:style-name="P12">Video Beam.</text:p>
        </text:list-item>
        <text:list-item>
          <text:p text:style-name="P12">Conexión a Internet.</text:p>
        </text:list-item>
      </text:list>
      <text:h text:style-name="Heading_20_3" text:outline-level="3">Recursos Didácticos</text:h>
      <text:list text:style-name="L13">
        <text:list-item>
          <text:p text:style-name="P13">Guía de aprendizaje.</text:p>
        </text:list-item>
        <text:list-item>
          <text:p text:style-name="P13">Presentaciones.</text:p>
        </text:list-item>
        <text:list-item>
          <text:p text:style-name="P13">Infografías.</text:p>
        </text:list-item>
        <text:list-item>
          <text:p text:style-name="P13">Videos educativos.</text:p>
        </text:list-item>
      </text:list>
      <text:p text:style-name="Horizontal_20_Line"/>
      <text:h text:style-name="Heading_20_1" text:outline-level="1">9. Evaluación</text:h>
      <text:h text:style-name="Heading_20_2" text:outline-level="2">Criterios de Evaluación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Criterio</text:p>
            </table:table-cell>
            <table:table-cell table:style-name="Tabla3.A1" office:value-type="string">
              <text:p text:style-name="Table_20_Heading">Porcentaje</text:p>
            </table:table-cell>
          </table:table-row>
        </table:table-header-rows>
        <table:table-row>
          <table:table-cell table:style-name="Tabla3.A1" office:value-type="string">
            <text:p text:style-name="Table_20_Contents">Participación</text:p>
          </table:table-cell>
          <table:table-cell table:style-name="Tabla3.A1" office:value-type="string">
            <text:p text:style-name="Table_20_Contents">20%</text:p>
          </table:table-cell>
        </table:table-row>
        <table:table-row>
          <table:table-cell table:style-name="Tabla3.A1" office:value-type="string">
            <text:p text:style-name="Table_20_Contents">Actividades teóricas</text:p>
          </table:table-cell>
          <table:table-cell table:style-name="Tabla3.A1" office:value-type="string">
            <text:p text:style-name="Table_20_Contents">20%</text:p>
          </table:table-cell>
        </table:table-row>
        <table:table-row>
          <table:table-cell table:style-name="Tabla3.A1" office:value-type="string">
            <text:p text:style-name="Table_20_Contents">Prácticas realizadas</text:p>
          </table:table-cell>
          <table:table-cell table:style-name="Tabla3.A1" office:value-type="string">
            <text:p text:style-name="Table_20_Contents">40%</text:p>
          </table:table-cell>
        </table:table-row>
        <table:table-row>
          <table:table-cell table:style-name="Tabla3.A1" office:value-type="string">
            <text:p text:style-name="Table_20_Contents">Producto final</text:p>
          </table:table-cell>
          <table:table-cell table:style-name="Tabla3.A1" office:value-type="string">
            <text:p text:style-name="Table_20_Contents">20%</text:p>
          </table:table-cell>
        </table:table-row>
      </table:table>
      <text:p text:style-name="Horizontal_20_Line"/>
      <text:h text:style-name="Heading_20_1" text:outline-level="1">10. Producto Final</text:h>
      <text:h text:style-name="Heading_20_2" text:outline-level="2">Reconocimiento Físico y Lógico del Equipo</text:h>
      <text:p text:style-name="Text_20_body">Cada estudiante deberá elaborar una ficha donde:</text:p>
      <text:h text:style-name="Heading_20_3" text:outline-level="3">Parte Física</text:h>
      <text:list text:style-name="L14">
        <text:list-item>
          <text:p text:style-name="P14">Identifique los componentes del computador.</text:p>
        </text:list-item>
        <text:list-item>
          <text:p text:style-name="P14">Describa su función.</text:p>
        </text:list-item>
      </text:list>
      <text:h text:style-name="Heading_20_3" text:outline-level="3"><text:soft-page-break/>Parte Lógica</text:h>
      <text:list text:style-name="L15">
        <text:list-item>
          <text:p text:style-name="P15">Identifique el sistema operativo.</text:p>
        </text:list-item>
        <text:list-item>
          <text:p text:style-name="P15">Mencione tres programas instalados.</text:p>
        </text:list-item>
        <text:list-item>
          <text:p text:style-name="P15">Explique para qué sirve cada uno.</text:p>
        </text:list-item>
      </text:list>
      <text:h text:style-name="Heading_20_3" text:outline-level="3">Entregable</text:h>
      <text:p text:style-name="Text_20_body">Ficha ilustrada o presentación corta mostrando:</text:p>
      <text:list text:style-name="L16">
        <text:list-item>
          <text:p text:style-name="P16">Hardware identificado.</text:p>
        </text:list-item>
        <text:list-item>
          <text:p text:style-name="P16">Software identificado.</text:p>
        </text:list-item>
        <text:list-item>
          <text:p text:style-name="P16">Capturas de pantalla del entorno Linux.</text:p>
        </text:list-item>
      </text:list>
      <text:p text:style-name="Horizontal_20_Line"/>
      <text:h text:style-name="Heading_20_1" text:outline-level="1">Actividad de Cierre</text:h>
      <text:h text:style-name="Heading_20_3" text:outline-level="3">"Conozco mi Computador"</text:h>
      <text:p text:style-name="Text_20_body">Cada estudiante realizará una exposición de 3 minutos donde explique:</text:p>
      <text:list text:style-name="L17">
        <text:list-item>
          <text:p text:style-name="P17">Qué es hardware.</text:p>
        </text:list-item>
        <text:list-item>
          <text:p text:style-name="P17">Qué es software.</text:p>
        </text:list-item>
        <text:list-item>
          <text:p text:style-name="P17">Qué es Linux.</text:p>
        </text:list-item>
        <text:list-item>
          <text:p text:style-name="P17">Qué aprendió durante la unidad.</text:p>
        </text:list-item>
      </text:list>
      <text:p text:style-name="Text_20_body"><text:span text:style-name="Strong_20_Emphasis">Resultado esperado:</text:span> El estudiante reconoce de manera básica la estructura física y lógica de un sistema informático y utiliza las funciones elementales del sistema operativo Linux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3T13:15:51.919107725</meta:creation-date>
    <dc:date>2026-06-13T13:19:03.592962032</dc:date>
    <meta:editing-duration>PT3M14S</meta:editing-duration>
    <meta:editing-cycles>1</meta:editing-cycles>
    <meta:document-statistic meta:table-count="3" meta:image-count="0" meta:object-count="0" meta:page-count="7" meta:paragraph-count="177" meta:word-count="688" meta:character-count="4515" meta:non-whitespace-character-count="4080"/>
    <meta:generator>LibreOffice/25.8.2.2$Linux_X86_64 LibreOffice_project/580$Build-2</meta:generator>
  </office:meta>
</office:document-meta>
</file>